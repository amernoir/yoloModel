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Menlo" fo:font-size="9.75pt" fo:letter-spacing="normal" fo:font-style="normal" fo:font-weight="normal" officeooo:rsid="00112216" officeooo:paragraph-rsid="00075b1c" fo:background-color="transparent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enlo" fo:font-size="9.75pt" fo:letter-spacing="normal" fo:font-style="normal" fo:font-weight="normal" fo:background-color="transparen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enlo" fo:font-size="9.75pt" fo:letter-spacing="normal" fo:font-style="normal" fo:font-weight="bold" fo:background-color="transparent" style:font-weight-asian="bold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fo:background-color="transparen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2pt" officeooo:rsid="00112216" fo:background-color="transparent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fo:background-color="transparen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rsid="00112216" officeooo:paragraph-rsid="00075b1c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075b1c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officeooo:paragraph-rsid="00075b1c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weight="bold" officeooo:paragraph-rsid="00075b1c" fo:background-color="transparent" style:font-weight-asian="bold" style:font-weight-complex="bold"/>
    </style:style>
    <style:style style:name="T1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" style:family="text">
      <style:text-properties fo:color="#000000" loext:opacity="100%" style:font-name="times new roman" fo:font-size="12pt" style:font-size-asian="12pt" style:font-size-complex="12pt"/>
    </style:style>
    <style:style style:name="T3" style:family="text">
      <style:text-properties fo:color="#000000" loext:opacity="100%" style:font-name="times new roman" fo:font-size="12pt" style:font-size-asian="12pt" style:font-size-complex="12pt"/>
    </style:style>
    <style:style style:name="T4" style:family="text">
      <style:text-properties style:font-name="Menlo" fo:font-size="9.75pt" fo:font-style="normal" fo:font-weight="normal"/>
    </style:style>
    <style:style style:name="T5" style:family="text">
      <style:text-properties style:font-name="Menlo" fo:font-size="9.75pt" fo:font-style="normal"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variant="normal" fo:text-transform="none" style:font-name="Menlo" fo:font-size="9.75pt" fo:letter-spacing="normal" fo:font-style="normal" fo:font-weight="normal"/>
    </style:style>
    <style:style style:name="T8" style:family="text">
      <style:text-properties officeooo:rsid="00075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=======</text:p>
      <text:p text:style-name="P4"><text:s text:c="20"/><text:span text:style-name="T5">ОБУЧЕНИЕ МОДЕЛИ YOLO26 ДЛЯ ДЕТЕКЦИИ ОБЪЕКТОВ</text:span></text:p>
      <text:p text:style-name="P2">================================================================================</text:p>
      <text:p text:style-name="P6"/>
      <text:p text:style-name="P2">Студент: Петрищев Е.С.</text:p>
      <text:p text:style-name="P2">Группа: МТИ2532</text:p>
      <text:p text:style-name="P2">Дата: <text:span text:style-name="T8">23.06.26 – 06.07.</text:span>26</text:p>
      <text:p text:style-name="P6"/>
      <text:p text:style-name="P2">================================================================================</text:p>
      <text:p text:style-name="P3">1. ОПИСАНИЕ ПРОЕКТА</text:p>
      <text:p text:style-name="P2">================================================================================</text:p>
      <text:p text:style-name="P6"/>
      <text:p text:style-name="P2">Цель работы: обучить модель YOLO26 для детекции объектов на выбранном датасете.</text:p>
      <text:p text:style-name="P6"/>
      <text:p text:style-name="P2">Задачи:</text:p>
      <text:p text:style-name="P2">- Подготовить датасет в формате YOLO</text:p>
      <text:p text:style-name="P2">- Настроить конфигурационный файл data.yaml</text:p>
      <text:p text:style-name="P2">- Обучить модель YOLO26n на 1 эпоху (тестовый запуск)</text:p>
      <text:p text:style-name="P2">- Выполнить инференс на тестовых изображениях</text:p>
      <text:p text:style-name="P2">- Оценить качество модели по метрикам</text:p>
      <text:p text:style-name="P6"/>
      <text:p text:style-name="P2">Датасет: pistol-granada.v1-1.yolov8 (Roboflow Universe)</text:p>
      <text:p text:style-name="P2">Классы: pistol (1 класс)</text:p>
      <text:p text:style-name="P2">Количество изображений:</text:p>
      <text:p text:style-name="P4"><text:s text:c="2"/><text:span text:style-name="T4">- Train: 2687</text:span></text:p>
      <text:p text:style-name="P4"><text:s text:c="2"/><text:span text:style-name="T4">- Valid: 269</text:span></text:p>
      <text:p text:style-name="P4"><text:s text:c="2"/><text:span text:style-name="T4">- Test: 299</text:span></text:p>
      <text:p text:style-name="P6"/>
      <text:p text:style-name="P2">================================================================================</text:p>
      <text:p text:style-name="P3">2. СТРУКТУРА ПРОЕКТА</text:p>
      <text:p text:style-name="P2">================================================================================</text:p>
      <text:p text:style-name="P6"/>
      <text:p text:style-name="P2">project/</text:p>
      <text:p text:style-name="P4">├── <text:span text:style-name="T4">dataset/ <text:s text:c="21"/># Датасет в формате YOLO</text:span></text:p>
      <text:p text:style-name="P4">│ <text:s text:c="2"/>├── <text:span text:style-name="T4">data.yaml <text:s text:c="16"/># Конфигурация датасета</text:span></text:p>
      <text:p text:style-name="P4">│ <text:s text:c="2"/>├── <text:span text:style-name="T4">train/</text:span></text:p>
      <text:p text:style-name="P4">│ <text:s text:c="2"/>│ <text:s text:c="2"/>├── <text:span text:style-name="T4">images/ <text:s text:c="14"/># Изображения для обучения</text:span></text:p>
      <text:p text:style-name="P4">│ <text:s text:c="2"/>│ <text:s text:c="2"/>└── <text:span text:style-name="T4">labels/ <text:s text:c="14"/># Разметка в формате YOLO</text:span></text:p>
      <text:p text:style-name="P4">│ <text:s text:c="2"/>├── <text:span text:style-name="T4">valid/</text:span></text:p>
      <text:p text:style-name="P4">│ <text:s text:c="2"/>│ <text:s text:c="2"/>├── <text:span text:style-name="T4">images/ <text:s text:c="14"/># Изображения для валидации</text:span></text:p>
      <text:p text:style-name="P4">│ <text:s text:c="2"/>│ <text:s text:c="2"/>└── <text:span text:style-name="T4">labels/ <text:s text:c="14"/># Разметка для валидации</text:span></text:p>
      <text:p text:style-name="P4">│ <text:s text:c="2"/>└── <text:span text:style-name="T4">test/</text:span></text:p>
      <text:p text:style-name="P4">│ <text:s text:c="6"/>├── <text:span text:style-name="T4">images/ <text:s text:c="14"/># Изображения для тестирования</text:span></text:p>
      <text:p text:style-name="P4">│ <text:s text:c="6"/>└── <text:span text:style-name="T4">labels/ <text:s text:c="14"/># Разметка для тестирования</text:span></text:p>
      <text:p text:style-name="P4"><text:soft-page-break/>│</text:p>
      <text:p text:style-name="P4">├── <text:span text:style-name="T4">runs/ <text:s text:c="24"/># Результаты обучения</text:span></text:p>
      <text:p text:style-name="P4">│ <text:s text:c="2"/>└── <text:span text:style-name="T4">detect/</text:span></text:p>
      <text:p text:style-name="P4">│ <text:s text:c="6"/>└── <text:span text:style-name="T4">t4_test-3/ <text:s text:c="11"/># Эксперимент (последний запуск)</text:span></text:p>
      <text:p text:style-name="P4">│ <text:s text:c="10"/>├── <text:span text:style-name="T4">weights/</text:span></text:p>
      <text:p text:style-name="P4">│ <text:s text:c="10"/>│ <text:s text:c="2"/>├── <text:span text:style-name="T4">best.pt <text:s text:c="6"/># Лучшие веса модели</text:span></text:p>
      <text:p text:style-name="P4">│ <text:s text:c="10"/>│ <text:s text:c="2"/>└── <text:span text:style-name="T4">last.pt <text:s text:c="6"/># Веса после последней эпохи</text:span></text:p>
      <text:p text:style-name="P4">│ <text:s text:c="10"/>├── <text:span text:style-name="T4">results.png <text:s text:c="6"/># Графики обучения</text:span></text:p>
      <text:p text:style-name="P4">│ <text:s text:c="10"/>├── <text:span text:style-name="T4">confusion_matrix.png <text:s/># Матрица ошибок</text:span></text:p>
      <text:p text:style-name="P4">│ <text:s text:c="10"/>├── <text:span text:style-name="T4">labels.jpg <text:s text:c="7"/># Визуализация разметки</text:span></text:p>
      <text:p text:style-name="P4">│ <text:s text:c="10"/>├── <text:span text:style-name="T4">train_batch*.jpg <text:s/># Примеры батчей обучения</text:span></text:p>
      <text:p text:style-name="P4">│ <text:s text:c="10"/>├── <text:span text:style-name="T4">val_batch*_pred.jpg <text:s text:c="2"/># Результаты валидации</text:span></text:p>
      <text:p text:style-name="P4">│ <text:s text:c="10"/>└── <text:span text:style-name="T4">results.csv <text:s text:c="6"/># Числовые метрики по эпохам</text:span></text:p>
      <text:p text:style-name="P4">│</text:p>
      <text:p text:style-name="P4">├── <text:span text:style-name="T4">pistol_report/ <text:s text:c="15"/># Собранный отчёт для сдачи</text:span></text:p>
      <text:p text:style-name="P4">│ <text:s text:c="2"/>├── <text:span text:style-name="T4">best.pt <text:s text:c="18"/># Веса модели</text:span></text:p>
      <text:p text:style-name="P4">│ <text:s text:c="2"/>├── <text:span text:style-name="T4">data.yaml <text:s text:c="16"/># Конфигурация</text:span></text:p>
      <text:p text:style-name="P4">│ <text:s text:c="2"/>├── <text:span text:style-name="T4">results.png <text:s text:c="14"/># Графики обучения</text:span></text:p>
      <text:p text:style-name="P4">│ <text:s text:c="2"/>├── <text:span text:style-name="T4">confusion_matrix.png <text:s text:c="5"/># Матрица ошибок</text:span></text:p>
      <text:p text:style-name="P4">│ <text:s text:c="2"/>├── <text:span text:style-name="T4">labels.jpg <text:s text:c="15"/># Визуализация разметки</text:span></text:p>
      <text:p text:style-name="P4">│ <text:s text:c="2"/>├── <text:span text:style-name="T4">metrics.txt <text:s text:c="14"/># Итоговые метрики</text:span></text:p>
      <text:p text:style-name="P4">│ <text:s text:c="2"/>├── <text:span text:style-name="T4">train_batches/ <text:s text:c="11"/># Примеры батчей обучения</text:span></text:p>
      <text:p text:style-name="P4">│ <text:s text:c="2"/>├── <text:span text:style-name="T4">val_batches/ <text:s text:c="13"/># Результаты валидации</text:span></text:p>
      <text:p text:style-name="P4">│ <text:s text:c="2"/>└── <text:span text:style-name="T4">inference_results/ <text:s text:c="7"/># Результаты инференса</text:span></text:p>
      <text:p text:style-name="P4">│</text:p>
      <text:p text:style-name="P4">├── <text:span text:style-name="T4">test_images/ <text:s text:c="17"/># Тестовые изображения для инференса</text:span></text:p>
      <text:p text:style-name="P4">├── <text:span text:style-name="T4">final_submit.zip <text:s text:c="13"/># Архив для сдачи</text:span></text:p>
      <text:p text:style-name="P4">├── <text:span text:style-name="T4">Untitled.ipynb <text:s text:c="15"/># Jupyter ноутбук с кодом</text:span></text:p>
      <text:p text:style-name="P4">├── <text:span text:style-name="T4">requirements.txt <text:s text:c="13"/># Зависимости Python</text:span></text:p>
      <text:p text:style-name="P4">└── <text:span text:style-name="T4">README.txt <text:s text:c="19"/># Этот файл</text:span></text:p>
      <text:p text:style-name="P6"/>
      <text:p text:style-name="P2">================================================================================</text:p>
      <text:p text:style-name="P3">3. УСТАНОВКА И ЗАПУСК</text:p>
      <text:p text:style-name="P2">================================================================================</text:p>
      <text:p text:style-name="P6"/>
      <text:p text:style-name="P2">3.1. Создание виртуального окружения (рекомендуется)</text:p>
      <text:p text:style-name="P6"/>
      <text:p text:style-name="P2"># Linux/Mac:</text:p>
      <text:p text:style-name="P2">python3 -m venv yolo_env</text:p>
      <text:p text:style-name="P2">source yolo_env/bin/activate</text:p>
      <text:p text:style-name="P6"/>
      <text:p text:style-name="P2"># Windows:</text:p>
      <text:p text:style-name="P2">python -m venv yolo_env</text:p>
      <text:p text:style-name="P2">yolo_env\Scripts\activate</text:p>
      <text:p text:style-name="P6"><text:soft-page-break/></text:p>
      <text:p text:style-name="P2">3.2. Установка зависимостей</text:p>
      <text:p text:style-name="P6"/>
      <text:p text:style-name="P2">pip install -r requirements.txt</text:p>
      <text:p text:style-name="P6"/>
      <text:p text:style-name="P2">Или вручную:</text:p>
      <text:p text:style-name="P2">pip install ultralytics torch torchvision pyyaml numpy pandas matplotlib seaborn Pillow scikit-learn ipykernel</text:p>
      <text:p text:style-name="P6"/>
      <text:p text:style-name="P2">3.3. Проверка установки</text:p>
      <text:p text:style-name="P6"/>
      <text:p text:style-name="P2">python -c "import torch; print(f'CUDA: {torch.cuda.is_available()}')"</text:p>
      <text:p text:style-name="P6"/>
      <text:p text:style-name="P2">================================================================================</text:p>
      <text:p text:style-name="P3">4. ОБУЧЕНИЕ МОДЕЛИ</text:p>
      <text:p text:style-name="P2">================================================================================</text:p>
      <text:p text:style-name="P6"/>
      <text:p text:style-name="P2">4.1. Тестовый запуск (1 эпоха)</text:p>
      <text:p text:style-name="P6"/>
      <text:p text:style-name="P2">Запускается в Jupyter Notebook (Untitled.ipynb):</text:p>
      <text:p text:style-name="P2">- Загрузка и распаковка датасета</text:p>
      <text:p text:style-name="P2">- Проверка структуры data.yaml</text:p>
      <text:p text:style-name="P2">- Обучение YOLO26n на 1 эпоху (batch=4, imgsz=416)</text:p>
      <text:p text:style-name="P6"/>
      <text:p text:style-name="P2">Команда обучения:</text:p>
      <text:p text:style-name="P2">model.train(</text:p>
      <text:p text:style-name="P4"><text:s text:c="4"/><text:span text:style-name="T4">data="dataset/data.yaml",</text:span></text:p>
      <text:p text:style-name="P4"><text:s text:c="4"/><text:span text:style-name="T4">epochs=1,</text:span></text:p>
      <text:p text:style-name="P4"><text:s text:c="4"/><text:span text:style-name="T4">imgsz=416,</text:span></text:p>
      <text:p text:style-name="P4"><text:s text:c="4"/><text:span text:style-name="T4">batch=4,</text:span></text:p>
      <text:p text:style-name="P4"><text:s text:c="4"/><text:span text:style-name="T4">device=0, <text:s text:c="9"/># GPU</text:span></text:p>
      <text:p text:style-name="P4"><text:s text:c="4"/><text:span text:style-name="T4">workers=2,</text:span></text:p>
      <text:p text:style-name="P4"><text:s text:c="4"/><text:span text:style-name="T4">name="t4_test"</text:span></text:p>
      <text:p text:style-name="P2">)</text:p>
      <text:p text:style-name="P6"/>
      <text:p text:style-name="P2">4.2. Полное обучение (рекомендуемые параметры)</text:p>
      <text:p text:style-name="P6"/>
      <text:p text:style-name="P2">Для получения качественной модели:</text:p>
      <text:p text:style-name="P2">model.train(</text:p>
      <text:p text:style-name="P4"><text:s text:c="4"/><text:span text:style-name="T4">data="dataset/data.yaml",</text:span></text:p>
      <text:p text:style-name="P4"><text:s text:c="4"/><text:span text:style-name="T4">epochs=80-100,</text:span></text:p>
      <text:p text:style-name="P4"><text:s text:c="4"/><text:span text:style-name="T4">imgsz=640,</text:span></text:p>
      <text:p text:style-name="P4"><text:s text:c="4"/><text:span text:style-name="T4">batch=8,</text:span></text:p>
      <text:p text:style-name="P4"><text:s text:c="4"/><text:span text:style-name="T4">device=0,</text:span></text:p>
      <text:p text:style-name="P4"><text:soft-page-break/><text:s text:c="4"/><text:span text:style-name="T4">workers=4,</text:span></text:p>
      <text:p text:style-name="P4"><text:s text:c="4"/><text:span text:style-name="T4">patience=20,</text:span></text:p>
      <text:p text:style-name="P4"><text:s text:c="4"/><text:span text:style-name="T4">seed=42,</text:span></text:p>
      <text:p text:style-name="P4"><text:s text:c="4"/><text:span text:style-name="T4">name="yolo26_exp"</text:span></text:p>
      <text:p text:style-name="P2">)</text:p>
      <text:p text:style-name="P6"/>
      <text:p text:style-name="P2">================================================================================</text:p>
      <text:p text:style-name="P3">5. РЕЗУЛЬТАТЫ ОБУЧЕНИЯ (1 эпоха)</text:p>
      <text:p text:style-name="P2">================================================================================</text:p>
      <text:p text:style-name="P6"/>
      <text:p text:style-name="P2">5.1. Метрики на валидационном наборе:</text:p>
      <text:p text:style-name="P6"/>
      <text:p text:style-name="Preformatted_20_Text">┌─────────────────┬─────────────┐</text:p>
      <text:p text:style-name="Preformatted_20_Text">│ Метрика <text:s text:c="8"/>│ Значение <text:s text:c="3"/>│</text:p>
      <text:p text:style-name="Preformatted_20_Text">├─────────────────┼─────────────┤</text:p>
      <text:p text:style-name="Preformatted_20_Text">│ Precision (P) <text:s text:c="2"/>│ 0.633 <text:s text:c="6"/>│</text:p>
      <text:p text:style-name="Preformatted_20_Text">│ Recall (R) <text:s text:c="5"/>│ 0.447 <text:s text:c="6"/>│</text:p>
      <text:p text:style-name="Preformatted_20_Text">│ mAP50 <text:s text:c="10"/>│ 0.498 <text:s text:c="6"/>│</text:p>
      <text:p text:style-name="Preformatted_20_Text">│ mAP50-95 <text:s text:c="7"/>│ 0.284 <text:s text:c="6"/>│</text:p>
      <text:p text:style-name="Preformatted_20_Text">│ mAP75 <text:s text:c="10"/>│ 0.318 <text:s text:c="6"/>│</text:p>
      <text:p text:style-name="Preformatted_20_Text">└─────────────────┴─────────────┘</text:p>
      <text:p text:style-name="P6"/>
      <text:p text:style-name="P2">5.2. Интерпретация:</text:p>
      <text:p text:style-name="P6"/>
      <text:p text:style-name="P2">- Precision = 0.633: 63% найденных объектов — действительно пистолеты</text:p>
      <text:p text:style-name="P2">- Recall = 0.447: модель нашла 45% всех пистолетов</text:p>
      <text:p text:style-name="P2">- mAP50 = 0.498: средняя точность при IoU=0.5 (49.8%)</text:p>
      <text:p text:style-name="P6"/>
      <text:p text:style-name="P2">Примечание: Метрики после 1 эпохи не являются финальными. </text:p>
      <text:p text:style-name="P2">Для получения качественной модели требуется 50-100 эпох.</text:p>
      <text:p text:style-name="P6"/>
      <text:p text:style-name="P2">================================================================================</text:p>
      <text:p text:style-name="P3">6. ИНФЕРЕНС НА ТЕСТОВЫХ ИЗОБРАЖЕНИЯХ</text:p>
      <text:p text:style-name="P2">================================================================================</text:p>
      <text:p text:style-name="P6"/>
      <text:p text:style-name="P2">Выполнен на 5 изображениях из тестового набора.</text:p>
      <text:p text:style-name="P6"/>
      <text:p text:style-name="P2">Результаты:</text:p>
      <text:p text:style-name="P2">- 4 изображения: успешная детекция пистолетов</text:p>
      <text:p text:style-name="P2">- 1 изображение: объектов не обнаружено (no detections)</text:p>
      <text:p text:style-name="P6"/>
      <text:p text:style-name="P2">Пример вывода:</text:p>
      <text:p text:style-name="P2">image 1/5: 256x416 2 pistols, 11.4ms</text:p>
      <text:p text:style-name="P2">image 2/5: 352x416 1 pistol, 9.9ms</text:p>
      <text:p text:style-name="P2">image 3/5: 320x416 1 pistol, 14.0ms</text:p>
      <text:p text:style-name="P2">image 4/5: 320x416 1 pistol, 11.4ms</text:p>
      <text:p text:style-name="P2"><text:soft-page-break/>image 5/5: 320x416 (no detections), 12.6ms</text:p>
      <text:p text:style-name="P6"/>
      <text:p text:style-name="P2">Скорость: ~12 мс на изображение</text:p>
      <text:p text:style-name="P6"/>
      <text:p text:style-name="P2">Результаты сохранены в: runs/detect/test_results/inference-2/</text:p>
      <text:p text:style-name="P6"/>
      <text:p text:style-name="P2">================================================================================</text:p>
      <text:p text:style-name="P3">7. МАТРИЦА ОШИБОК (CONFUSION MATRIX)</text:p>
      <text:p text:style-name="P6"><text:span text:style-name="T7">================================================================================</text:span></text:p>
      <text:p text:style-name="P2">Расшифровка:</text:p>
      <text:p text:style-name="P2">- 104: правильно найденных пистолетов (True Positive)</text:p>
      <text:p text:style-name="P2">- 16: пропущенных пистолетов (False Negative) - 13.3% потерь</text:p>
      <text:p text:style-name="P2">- 0: ложных срабатываний на фоне (False Positive) - отлично!</text:p>
      <text:p text:style-name="P2">- 400: правильно определённых фоновых кадров (True Negative)</text:p>
      <text:p text:style-name="P6"/>
      <text:p text:style-name="P2">Вывод: модель не ошибается на фоне, но пропускает часть пистолетов.</text:p>
      <text:p text:style-name="P2">Рекомендуется увеличить количество эпох для повышения Recall.</text:p>
      <text:p text:style-name="P6"/>
      <text:p text:style-name="P2">================================================================================</text:p>
      <text:p text:style-name="P3">8. СОСТАВ ОТЧЁТА (pistol_report/)</text:p>
      <text:p text:style-name="P2">================================================================================</text:p>
      <text:p text:style-name="P6"/>
      <text:p text:style-name="P2">Файлы в архиве final_submit.zip:</text:p>
      <text:p text:style-name="P6"/>
      <text:p text:style-name="Preformatted_20_Text">┌─────────────────────────────────────┬──────────────┐</text:p>
      <text:p text:style-name="Preformatted_20_Text">│ Файл <text:s text:c="31"/>│ Размер <text:s text:c="6"/>│</text:p>
      <text:p text:style-name="Preformatted_20_Text">├─────────────────────────────────────┼──────────────┤</text:p>
      <text:p text:style-name="Preformatted_20_Text">│ best.pt <text:s text:c="28"/>│ 5.09 MB <text:s text:c="5"/>│</text:p>
      <text:p text:style-name="Preformatted_20_Text">│ confusion_matrix.png <text:s text:c="15"/>│ 94.4 KB <text:s text:c="5"/>│</text:p>
      <text:p text:style-name="Preformatted_20_Text">│ results.png <text:s text:c="24"/>│ 189.4 KB <text:s text:c="4"/>│</text:p>
      <text:p text:style-name="Preformatted_20_Text">│ labels.jpg <text:s text:c="25"/>│ ~200 KB <text:s text:c="5"/>│</text:p>
      <text:p text:style-name="Preformatted_20_Text">│ metrics.txt <text:s text:c="24"/>│ 0.2 KB <text:s text:c="6"/>│</text:p>
      <text:p text:style-name="Preformatted_20_Text">│ data.yaml <text:s text:c="26"/>│ 0.3 KB <text:s text:c="6"/>│</text:p>
      <text:p text:style-name="Preformatted_20_Text">│ train_batches/*.jpg (3 файла) <text:s text:c="6"/>│ ~500 KB <text:s text:c="5"/>│</text:p>
      <text:p text:style-name="Preformatted_20_Text">│ val_batches/*.jpg (2 файла) <text:s text:c="8"/>│ ~300 KB <text:s text:c="5"/>│</text:p>
      <text:p text:style-name="Preformatted_20_Text">│ inference_results/*.jpg (5 файлов) <text:s/>│ ~130 KB <text:s text:c="5"/>│</text:p>
      <text:p text:style-name="Preformatted_20_Text">└─────────────────────────────────────┴──────────────┘</text:p>
      <text:p text:style-name="P6"/>
      <text:p text:style-name="P2">================================================================================</text:p>
      <text:p text:style-name="P3">9. ВЫВОДЫ</text:p>
      <text:p text:style-name="P2">================================================================================</text:p>
      <text:p text:style-name="P6"/>
      <text:p text:style-name="P2">1. Датасет успешно загружен и подготовлен в формате YOLO.</text:p>
      <text:p text:style-name="P2">2. Модель YOLO26n обучена на 1 эпоху для проверки работоспособности.</text:p>
      <text:p text:style-name="P2">3. Метрики показывают хорошую Precision (63%), но Recall требует улучшения.</text:p>
      <text:p text:style-name="P2">4. Инференс успешно выполнен на тестовых изображениях.</text:p>
      <text:p text:style-name="P2">5. Для получения финальной модели рекомендуется:</text:p>
      <text:p text:style-name="P4"><text:s text:c="3"/><text:span text:style-name="T4">- Увеличить эпохи до 50-100</text:span></text:p>
      <text:p text:style-name="P4"><text:soft-page-break/><text:s text:c="3"/><text:span text:style-name="T4">- Использовать imgsz=640 и batch=8</text:span></text:p>
      <text:p text:style-name="P4"><text:s text:c="3"/><text:span text:style-name="T4">- Добавить аугментацию данных</text:span></text:p>
      <text:p text:style-name="P6"/>
      <text:p text:style-name="P2">================================================================================</text:p>
      <text:p text:style-name="P3">10. ИСПОЛЬЗОВАННЫЕ ИСТОЧНИКИ</text:p>
      <text:p text:style-name="P2">================================================================================</text:p>
      <text:p text:style-name="P6"/>
      <text:p text:style-name="P2">1. Ultralytics YOLO Documentation: https://docs.ultralytics.com/</text:p>
      <text:p text:style-name="P2">2. Roboflow Universe: https://universe.roboflow.com/</text:p>
      <text:p text:style-name="P2">3. Руководство по обучению YOLO26 (практическое руководство, 2026)</text:p>
      <text:p text:style-name="P6"/>
      <text:p text:style-name="P2">================================================================================</text:p>
      <text:p text:style-name="P3">11. КОНТАКТНАЯ ИНФОРМАЦИЯ</text:p>
      <text:p text:style-name="P2">================================================================================</text:p>
      <text:p text:style-name="P6"/>
      <text:p text:style-name="P2">Студент: Петрищев Е.С.</text:p>
      <text:p text:style-name="P2">Группа: МТИ2532</text:p>
      <text:p text:style-name="P6"><text:span text:style-name="T7">Email: pes17021702@mail.ru</text:span></text:p>
      <text:p text:style-name="P5"/>
      <text:p text:style-name="P7"/>
      <text:p text:style-name="P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20:24:23.029219616</meta:creation-date>
    <dc:date>2026-07-02T20:31:30.688458363</dc:date>
    <meta:editing-duration>PT7M8S</meta:editing-duration>
    <meta:editing-cycles>1</meta:editing-cycles>
    <meta:document-statistic meta:table-count="0" meta:image-count="0" meta:object-count="0" meta:page-count="6" meta:paragraph-count="198" meta:word-count="841" meta:character-count="8608" meta:non-whitespace-character-count="6987"/>
    <meta:generator>LibreOffice/24.2.7.2$Linux_X86_64 LibreOffice_project/420$Build-2</meta:generator>
  </office:meta>
</office:document-meta>
</file>